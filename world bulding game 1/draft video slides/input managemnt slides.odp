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500000225D0DDC2C2.png" manifest:media-type="image/png"/>
  <manifest:file-entry manifest:full-path="Pictures/10000001000002B000000083CE8259E4.png" manifest:media-type="image/png"/>
  <manifest:file-entry manifest:full-path="Pictures/100000010000006900000067EE585D43.png" manifest:media-type="image/png"/>
  <manifest:file-entry manifest:full-path="Pictures/1000000100000262000001E419BA7414.png" manifest:media-type="image/png"/>
  <manifest:file-entry manifest:full-path="Pictures/100000000000006E0000006B0DF23044.png" manifest:media-type="image/png"/>
  <manifest:file-entry manifest:full-path="Pictures/10000000000001790000016A6B543D83.png" manifest:media-type="image/png"/>
  <manifest:file-entry manifest:full-path="Pictures/1000000000000069000000670C489800.png" manifest:media-type="image/png"/>
  <manifest:file-entry manifest:full-path="Pictures/1000000000000088000000862D9EE71B.png" manifest:media-type="image/png"/>
  <manifest:file-entry manifest:full-path="Pictures/100000010000006E0000006B5201AA84.png" manifest:media-type="image/png"/>
  <manifest:file-entry manifest:full-path="Pictures/100000000000006900000067659E7CB6.png" manifest:media-type="image/png"/>
  <manifest:file-entry manifest:full-path="Pictures/100000000000006E0000006BB829D614.png" manifest:media-type="image/png"/>
  <manifest:file-entry manifest:full-path="Pictures/100000010000006900000067C4503B3C.png" manifest:media-type="image/png"/>
  <manifest:file-entry manifest:full-path="Pictures/10000000000000880000008680787181.png" manifest:media-type="image/png"/>
  <manifest:file-entry manifest:full-path="Pictures/1000000100000088000000865ABDF3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color="#333333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solid" draw:fill-color="#fffff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14cm" fo:min-width="1.06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53cm" fo:min-width="0.707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96cm" fo:min-width="0.317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96cm" fo:min-width="0.419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09cm" fo:min-width="0.79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45cm" fo:min-width="0.69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7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18cm" fo:min-width="0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38cm" fo:min-width="2.459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202cm" fo:min-width="2.4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0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7cm" fo:min-width="0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61cm" fo:min-width="0.751cm" style:protect="siz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584cm" fo:min-width="0.75cm"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3.524cm" fo:min-width="3.274cm" style:protect="size" loext:decorative="false"/>
    </style:style>
    <style:style style:name="gr23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3.524cm" fo:min-width="3.274cm" style:protect="siz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518cm" fo:min-width="1.268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62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0" style:family="graphic" style:parent-style-name="standard">
      <style:graphic-properties svg:stroke-color="#ff0000" draw:fill="none" loext:fill-use-slide-background="false" draw:opacity="100%" draw:opacity-name="" draw:textarea-horizontal-align="justify" draw:textarea-vertical-align="middle" draw:auto-grow-height="false" fo:min-height="3.71cm" fo:min-width="5.058cm" loext:decorative="false"/>
    </style:style>
    <style:style style:name="gr31" style:family="graphic" style:parent-style-name="standard">
      <style:graphic-properties svg:stroke-color="#18a303" draw:fill="none" loext:fill-use-slide-background="false" draw:opacity="100%" draw:opacity-name="" draw:textarea-horizontal-align="justify" draw:textarea-vertical-align="middle" draw:auto-grow-height="false" fo:min-height="3.71cm" fo:min-width="1.768cm" loext:decorative="false"/>
    </style:style>
    <style:style style:name="gr32" style:family="graphic" style:parent-style-name="standard">
      <style:graphic-properties svg:stroke-color="#ff0000" draw:fill="none" loext:fill-use-slide-background="false" draw:opacity="100%" draw:opacity-name="" draw:textarea-horizontal-align="justify" draw:textarea-vertical-align="middle" draw:auto-grow-height="false" fo:min-height="3.71cm" fo:min-width="8.997cm" loext:decorative="false"/>
      <style:paragraph-properties style:writing-mode="lr-tb"/>
    </style:style>
    <style:style style:name="gr33" style:family="graphic" style:parent-style-name="standard">
      <style:graphic-properties svg:stroke-color="#18a303" draw:fill="none" loext:fill-use-slide-background="false" draw:opacity="100%" draw:opacity-name="" draw:textarea-horizontal-align="justify" draw:textarea-vertical-align="middle" draw:auto-grow-height="false" fo:min-height="3.71cm" fo:min-width="8.278cm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gr35" style:family="graphic" style:parent-style-name="standard">
      <style:graphic-properties svg:stroke-color="#18a303" draw:fill="none" loext:fill-use-slide-background="false" draw:opacity="100%" draw:opacity-name="" draw:textarea-horizontal-align="justify" draw:textarea-vertical-align="middle" draw:auto-grow-height="false" fo:min-height="3.71cm" fo:min-width="2.545cm" loext:decorative="false"/>
    </style:style>
    <style:style style:name="gr36" style:family="graphic" style:parent-style-name="standard">
      <style:graphic-properties svg:stroke-color="#18a303" draw:fill="none" loext:fill-use-slide-background="false" draw:opacity="100%" draw:opacity-name="" draw:textarea-horizontal-align="justify" draw:textarea-vertical-align="middle" draw:auto-grow-height="false" fo:min-height="3.71cm" fo:min-width="1.975cm" loext:decorative="false"/>
    </style:style>
    <style:style style:name="gr37" style:family="graphic" style:parent-style-name="standard">
      <style:graphic-properties svg:stroke-color="#18a303" draw:fill="none" loext:fill-use-slide-background="false" draw:opacity="100%" draw:opacity-name="" draw:textarea-horizontal-align="justify" draw:textarea-vertical-align="middle" draw:auto-grow-height="false" fo:min-height="3.71cm" fo:min-width="1.632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50pt" style:font-size-asian="50pt" style:font-size-complex="50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opacity="10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02cm" svg:height="3.465cm" svg:x="4.904cm" svg:y="4.713cm">
          <draw:image xlink:href="Pictures/10000001000002B000000083CE8259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Managing <text:s/>inputs</text:p>
          </draw:text-box>
        </draw:frame>
        <draw:frame draw:style-name="gr1" draw:text-style-name="P1" draw:layer="layout" svg:width="5.639cm" svg:height="4.474cm" svg:x="0.516cm" svg:y="4.001cm">
          <draw:image xlink:href="Pictures/1000000100000262000001E419BA74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5201AA84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4503B3C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EE585D43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5ABDF36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ach input one at a time shown when i spea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22cm" svg:y="5.552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17.614cm 6.617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4.56cm" svg:y="5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32cm" svg:y="5.7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33cm" svg:y="6.7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9.755cm 2.168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57cm" svg:y="2.419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95cm" svg:y="1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0.967cm" svg:y="2.61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0.968cm" svg:y="3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draw:layer="layout" svg:width="1.689cm" svg:height="1.689cm" svg:x="15.614cm" svg:y="2.629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46cm" svg:y="3.865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705cm" svg:y="4.056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543cm" svg:y="3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21.533cm" svg:y="4.457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5">
          <draw:custom-shape draw:style-name="gr16" draw:text-style-name="P6" draw:layer="layout" svg:width="2.959cm" svg:height="0.488cm" svg:x="17.669cm" svg:y="4.5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67cm" svg:y="5.53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87cm 3.927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827cm" svg:y="3.7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2.019cm" svg:height="1.932cm" svg:x="7.659cm" svg:y="11.89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6" draw:layer="layout" svg:width="1.881cm" svg:height="1.376cm" svg:x="1.618cm" svg:y="12.081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4" draw:text-style-name="P6" draw:layer="layout" svg:width="2.315cm" svg:height="2.298cm" svg:x="4.456cm" svg:y="11.6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21.673cm" svg:y="12.77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21.674cm" svg:y="13.77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draw:transform="rotate (-1.55247036964896) translate (15.9cm 11.952cm)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6" draw:layer="layout" svg:width="2.315cm" svg:height="2.298cm" svg:x="10.74cm" svg:y="11.7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6" draw:layer="layout" svg:width="2.315cm" svg:height="2.298cm" svg:x="16.329cm" svg:y="11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1.566cm" svg:height="1.741cm" svg:x="19.252cm" svg:y="12.326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25.589cm" svg:y="12.832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2 ways</text:p>
          </draw:text-box>
        </draw:frame>
        <draw:frame draw:style-name="gr1" draw:text-style-name="P1" draw:layer="layout" svg:width="8.895cm" svg:height="7.057cm" svg:x="15.87cm" svg:y="4.165cm">
          <draw:image xlink:href="Pictures/1000000100000262000001E419BA7414.png" xlink:type="simple" xlink:show="embed" xlink:actuate="onLoad" draw:mime-type="image/png">
            <text:p/>
          </draw:image>
        </draw:frame>
        <draw:frame draw:style-name="gr1" draw:text-style-name="P1" draw:layer="layout" svg:width="10.557cm" svg:height="7.06cm" svg:x="1.441cm" svg:y="4.255cm">
          <draw:image xlink:href="Pictures/100000010000033500000225D0DDC2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-0.807389311972577) translate (2.925cm 3.185cm)">
          <text:p/>
          <draw:enhanced-geometry svg:viewBox="0 0 21600 21600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6.057cm" svg:height="6.458cm" svg:x="11.036cm" svg:y="3.429cm">
          <draw:text-box>
            <text:p><text:span text:style-name="T2">7 <text:s/>8 <text:s/>9</text:span></text:p>
            <text:p><text:span text:style-name="T2">4 <text:s/>5 <text:s/>6</text:span></text:p>
            <text:p><text:span text:style-name="T2">1 <text:s/>2 <text:s/>3</text:span></text:p>
          </draw:text-box>
        </draw:frame>
        <draw:frame draw:style-name="gr19" draw:text-style-name="P10" draw:layer="layout" svg:width="9.503cm" svg:height="7.137cm" svg:x="18.382cm" svg:y="3.533cm">
          <draw:text-box>
            <text:p><text:span text:style-name="T2">UL <text:s/>U <text:s text:c="2"/>UR</text:span></text:p>
            <text:p><text:span text:style-name="T2">L <text:s text:c="4"/>N <text:s text:c="4"/>R</text:span></text:p>
            <text:p><text:span text:style-name="T2">DL <text:s/>D <text:s text:c="2"/>D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ypes of blocking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ages of sf6(regular and parry),smash b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ow blocking works</text:p>
          </draw:text-box>
        </draw:frame>
        <draw:custom-shape draw:style-name="gr20" draw:text-style-name="P6" draw:layer="layout" svg:width="2.5cm" svg:height="2.5cm" draw:transform="rotate (-1.5707963267949) translate (7.767cm 3.7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6" draw:layer="layout" svg:width="2.5cm" svg:height="2.5cm" draw:transform="rotate (-1.5707963267949) translate (7.527cm 10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6" draw:layer="layout" svg:width="2.5cm" svg:height="2.5cm" draw:transform="rotate (-1.5707963267949) translate (9.654cm 7.0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2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code 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e subjective Projectile case </text:p>
          </draw:text-box>
        </draw:frame>
        <draw:custom-shape draw:style-name="gr22" draw:text-style-name="P6" draw:layer="layout" svg:width="6cm" svg:height="6cm" svg:x="13.12cm" svg:y="3.6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1" draw:layer="layout" svg:width="6cm" svg:height="6cm" svg:x="13.12cm" svg:y="7.2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6" draw:layer="layout" svg:width="2.5cm" svg:height="2.5cm" svg:x="6.56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o do this in game engine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>How to make an input manger fo fighting game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909cm" svg:height="2.83cm" svg:x="2.736cm" svg:y="6.629cm">
          <draw:image xlink:href="Pictures/100000000000006E0000006B0DF23044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42cm" svg:y="9.761cm">
          <draw:image xlink:href="Pictures/100000000000006900000067659E7CB6.png" xlink:type="simple" xlink:show="embed" xlink:actuate="onLoad" draw:mime-type="image/png">
            <text:p/>
          </draw:image>
        </draw:frame>
        <draw:frame draw:style-name="gr3" draw:text-style-name="P3" draw:layer="layout" svg:width="2.777cm" svg:height="2.724cm" svg:x="6.182cm" svg:y="3.598cm">
          <draw:image xlink:href="Pictures/1000000000000069000000670C489800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705cm" svg:y="6.669cm">
          <draw:image xlink:href="Pictures/1000000000000088000000862D9EE71B.png" xlink:type="simple" xlink:show="embed" xlink:actuate="onLoad" draw:mime-type="image/png">
            <text:p/>
          </draw:image>
        </draw:frame>
        <draw:frame draw:style-name="gr3" draw:text-style-name="P3" draw:layer="layout" svg:width="9.974cm" svg:height="9.577cm" svg:x="16.051cm" svg:y="3.703cm">
          <draw:image xlink:href="Pictures/10000000000001790000016A6B543D83.png" xlink:type="simple" xlink:show="embed" xlink:actuate="onLoad" draw:mime-type="image/png">
            <text:p/>
          </draw:image>
        </draw:frame>
        <draw:frame draw:style-name="gr4" draw:text-style-name="P4" draw:layer="layout" svg:width="2.909cm" svg:height="2.83cm" svg:x="2.627cm" svg:y="3.436cm">
          <draw:image xlink:href="Pictures/100000000000006E0000006BB829D614.png" xlink:type="simple" xlink:show="embed" xlink:actuate="onLoad" draw:mime-type="image/png">
            <text:p/>
          </draw:image>
        </draw:frame>
        <draw:frame draw:style-name="gr3" draw:text-style-name="P3" draw:layer="layout" svg:width="2.534cm" svg:height="2.497cm" svg:x="9.513cm" svg:y="9.794cm">
          <draw:image xlink:href="Pictures/10000000000000880000008680787181.png" xlink:type="simple" xlink:show="embed" xlink:actuate="onLoad" draw:mime-type="image/png">
            <text:p/>
          </draw:image>
        </draw:frame>
        <draw:g draw:style-name="gr5">
          <draw:frame draw:style-name="gr6" draw:text-style-name="P5" draw:layer="layout" svg:width="2.909cm" svg:height="2.83cm" svg:x="2.847cm" svg:y="9.577cm">
            <draw:image xlink:href="Pictures/100000010000006E0000006B5201AA84.png" xlink:type="simple" xlink:show="embed" xlink:actuate="onLoad" draw:mime-type="image/png">
              <text:p/>
            </draw:image>
          </draw:frame>
          <draw:frame draw:style-name="gr6" draw:text-style-name="P5" draw:layer="layout" svg:width="2.777cm" svg:height="2.724cm" svg:x="2.979cm" svg:y="9.683cm">
            <draw:image xlink:href="Pictures/100000010000006900000067C4503B3C.png" xlink:type="simple" xlink:show="embed" xlink:actuate="onLoad" draw:mime-type="image/png">
              <text:p/>
            </draw:image>
          </draw:frame>
        </draw:g>
        <draw:g draw:style-name="gr5">
          <draw:frame draw:style-name="gr6" draw:text-style-name="P5" draw:layer="layout" svg:width="2.546cm" svg:height="2.497cm" svg:x="9.452cm" svg:y="3.589cm">
            <draw:image xlink:href="Pictures/100000010000006900000067EE585D43.png" xlink:type="simple" xlink:show="embed" xlink:actuate="onLoad" draw:mime-type="image/png">
              <text:p/>
            </draw:image>
          </draw:frame>
          <draw:frame draw:style-name="gr6" draw:text-style-name="P5" draw:layer="layout" svg:width="2.534cm" svg:height="2.497cm" svg:x="9.452cm" svg:y="3.589cm">
            <draw:image xlink:href="Pictures/1000000100000088000000865ABDF36A.png" xlink:type="simple" xlink:show="embed" xlink:actuate="onLoad" draw:mime-type="image/png">
              <text:p/>
            </draw:image>
          </draw:fram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763cm" svg:y="5.36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1.532cm" svg:y="5.58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717cm" svg:y="8.2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0" draw:text-style-name="P6" draw:layer="layout" svg:width="1.881cm" svg:height="1.376cm" svg:x="4.681cm" svg:y="3.098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-2.40942703237817) translate (9.502cm 4.3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8.448cm 10.41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0.776322451287078) translate (1.356cm 8.9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6" draw:layer="layout" svg:width="1.675cm" svg:height="1.861cm" draw:transform="skewX (-0.00209439510239321) rotate (-0.808261976598574) translate (3.01cm 3.18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65cm" svg:y="5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796cm" svg:height="2.428cm" svg:x="2.143cm" svg:y="0.48cm">
          <draw:text-box>
            <text:p><text:span text:style-name="T1">Each input one at a time shown when i speak</text:span></text:p>
          </draw:text-box>
        </draw:frame>
        <draw:custom-shape draw:style-name="gr14" draw:text-style-name="P6" draw:layer="layout" svg:width="2.315cm" svg:height="2.298cm" svg:x="10.829cm" svg:y="3.7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1.452cm" svg:y="7.7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1.453cm" svg:y="8.7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7.535cm" svg:y="1.078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2.243cm" svg:y="1.43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6.075cm 3.43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3" draw:text-style-name="P9" draw:layer="layout" svg:width="3.492cm" svg:height="3.095cm" svg:x="21.863cm" svg:y="1.09cm">
          <draw:text-box>
            <text:p><text:span text:style-name="T1">Some attack</text:span></text:p>
            <text:p><text:span text:style-name="T1">DQCF+LP</text:span></text:p>
            <text:p><text:span text:style-name="T1"/></text:p>
          </draw:text-box>
        </draw:frame>
        <draw:frame draw:style-name="gr3" draw:text-style-name="P3" draw:layer="layout" svg:width="2.909cm" svg:height="2.83cm" svg:x="12.959cm" svg:y="0.975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10.011cm" svg:y="1.0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81cm" svg:y="1.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82cm" svg:y="2.522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019cm" svg:height="1.932cm" svg:x="1.958cm" svg:y="4.884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4.565cm" svg:y="5.148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8.017cm 6.90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3" draw:text-style-name="P9" draw:layer="layout" svg:width="3.492cm" svg:height="3.806cm" svg:x="21.711cm" svg:y="4.954cm">
          <draw:text-box>
            <text:p><text:span text:style-name="T1">Some other attack</text:span></text:p>
            <text:p text:style-name="P12"><text:span text:style-name="T1">FDPD+LP</text:span></text:p>
            <text:p><text:span text:style-name="T1"/></text:p>
          </draw:text-box>
        </draw:frame>
        <draw:frame draw:style-name="gr3" draw:text-style-name="P3" draw:layer="layout" svg:width="2.909cm" svg:height="2.83cm" svg:x="12.807cm" svg:y="4.839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859cm" svg:y="4.9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429cm" svg:y="5.3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43cm" svg:y="6.38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1.566cm" svg:height="1.741cm" svg:x="7.623cm" svg:y="8.251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843cm" svg:y="8.593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0.776322451287078) translate (4.287cm 9.05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2.534cm" svg:height="2.497cm" svg:x="13.17cm" svg:y="7.984cm">
          <draw:image xlink:href="Pictures/1000000000000088000000862D9EE71B.png" xlink:type="simple" xlink:show="embed" xlink:actuate="onLoad" draw:mime-type="image/png">
            <text:p/>
          </draw:image>
        </draw:frame>
        <draw:custom-shape draw:style-name="gr14" draw:text-style-name="P6" draw:layer="layout" svg:width="2.315cm" svg:height="2.298cm" svg:x="9.955cm" svg:y="8.0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5">
          <draw:custom-shape draw:style-name="gr16" draw:text-style-name="P6" draw:layer="layout" svg:width="2.959cm" svg:height="0.488cm" svg:x="17.505cm" svg:y="8.76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975cm" svg:height="0.452cm" svg:x="17.506cm" svg:y="9.755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9" draw:layer="layout" svg:width="4.29cm" svg:height="4.517cm" svg:x="21.902cm" svg:y="8.552cm">
          <draw:text-box>
            <text:p><text:span text:style-name="T1">Some other other attack</text:span></text:p>
            <text:p text:style-name="P12"><text:span text:style-name="T1">DQCB e+HK</text:span></text:p>
            <text:p><text:span text:style-name="T1"/></text:p>
          </draw:text-box>
        </draw:frame>
        <draw:frame draw:style-name="gr26" draw:text-style-name="P9" draw:layer="layout" svg:width="5.775cm" svg:height="0.962cm" svg:x="21.235cm" svg:y="0.094cm">
          <draw:text-box>
            <text:p><text:span text:style-name="T1">Add images V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5.377cm" svg:y="0.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0.085cm" svg:y="0.80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3.917cm 2.8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13.758cm" svg:y="5.51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7.165cm" svg:y="5.62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20.617cm 7.382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svg:x="7.661cm" svg:y="5.567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805cm" svg:y="6.00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0.776322451287078) translate (4.325cm 6.37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0.985cm" svg:y="5.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19cm" svg:height="1.932cm" svg:x="13.38cm" svg:y="9.11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8.088cm" svg:y="9.4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1.92cm 11.46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19.876cm" svg:y="9.466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17.17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.039cm" svg:y="9.465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4.952cm" svg:y="9.37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845cm" svg:y="5.2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28" draw:text-style-name="P14" draw:layer="layout" svg:width="3.116cm" svg:height="1.673cm" svg:x="22.727cm" svg:y="12.405cm">
          <draw:text-box>
            <text:p>Newest</text:p>
          </draw:text-box>
        </draw:frame>
        <draw:frame draw:style-name="gr29" draw:text-style-name="P15" draw:layer="layout" svg:width="6.643cm" svg:height="2.986cm" svg:x="2.209cm" svg:y="0.459cm">
          <draw:text-box>
            <text:p text:style-name="P12">A scanner of the inputs showing when a code is valid slowly</text:p>
          </draw:text-box>
        </draw:frame>
        <draw:custom-shape draw:style-name="gr30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268cm" svg:height="3.96cm" svg:x="1.805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9.497cm" svg:height="3.96cm" svg:x="7.08cm" svg:y="4.4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5.558cm" svg:height="3.96cm" svg:x="4.073cm" svg:y="4.4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9.497cm" svg:height="3.96cm" svg:x="9.631cm" svg:y="4.4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8.778cm" svg:height="3.96cm" svg:x="7.782cm" svg:y="8.45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7" draw:text-style-name="P6" draw:layer="layout" svg:width="2.019cm" svg:height="1.932cm" svg:x="15.377cm" svg:y="0.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0.085cm" svg:y="0.809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3.917cm 2.8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6" draw:layer="layout" svg:width="2.019cm" svg:height="1.932cm" svg:x="20.1cm" svg:y="9.22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6" draw:layer="layout" svg:width="1.619cm" svg:height="1.618cm" svg:x="1.768cm" svg:y="9.6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" draw:text-style-name="P6" draw:layer="layout" svg:width="1.566cm" svg:height="1.741cm" draw:transform="rotate (2.42949831877611) translate (11.92cm 11.46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8" draw:layer="layout" svg:width="1.689cm" svg:height="1.689cm" svg:x="4.643cm" svg:y="9.713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8.036cm" svg:y="9.712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689cm" svg:height="1.689cm" svg:x="22.94cm" svg:y="9.751cm">
          <text:p text:style-name="P7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2.874cm" svg:height="1.673cm" svg:x="2.037cm" svg:y="3.693cm">
          <draw:text-box>
            <text:p text:style-name="P12">oldest</text:p>
          </draw:text-box>
        </draw:frame>
        <draw:frame draw:style-name="gr28" draw:text-style-name="P14" draw:layer="layout" svg:width="3.116cm" svg:height="1.673cm" svg:x="22.727cm" svg:y="12.405cm">
          <draw:text-box>
            <text:p>Newest</text:p>
          </draw:text-box>
        </draw:frame>
        <draw:frame draw:style-name="gr34" draw:text-style-name="P15" draw:layer="layout" svg:width="6.643cm" svg:height="3.806cm" svg:x="1.771cm" svg:y="0cm">
          <draw:text-box>
            <text:p text:style-name="P12">A scanner of the inputs showing when a code is valid slowly and this time with gaps</text:p>
          </draw:text-box>
        </draw:frame>
        <draw:custom-shape draw:style-name="gr35" draw:text-style-name="P16" draw:layer="layout" svg:width="3.045cm" svg:height="3.96cm" svg:x="19.434cm" svg:y="8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566cm" svg:height="1.741cm" draw:transform="rotate (2.42949831877611) translate (14.851cm 11.64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6" draw:layer="layout" svg:width="1.566cm" svg:height="1.741cm" draw:transform="rotate (2.42949831877611) translate (17.745cm 11.6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6" draw:text-style-name="P16" draw:layer="layout" svg:width="2.475cm" svg:height="3.96cm" svg:x="10.602cm" svg:y="8.4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132cm" svg:height="3.96cm" svg:x="1.618cm" svg:y="8.45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00080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21:17:20.095993390</meta:creation-date>
    <dc:date>2025-12-27T22:50:51.502188009</dc:date>
    <meta:editing-duration>PT36M59S</meta:editing-duration>
    <meta:editing-cycles>3</meta:editing-cycles>
    <meta:generator>LibreOffice/25.8.4.2$Linux_X86_64 LibreOffice_project/0366609b1de41a39e1896ae41e33c673f2a73802</meta:generator>
    <meta:document-statistic meta:object-count="249"/>
  </office:meta>
</office:document-meta>
</file>